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rank</text:p>
          </table:table-cell>
          <table:table-cell table:style-name="Default" office:value-type="string" calcext:value-type="string">
            <text:p>title</text:p>
          </table:table-cell>
          <table:table-cell office:value-type="string" calcext:value-type="string">
            <text:p>lifetime_gross</text:p>
          </table:table-cell>
          <table:table-cell table:style-name="Default" office:value-type="string" calcext:value-type="string">
            <text:p>yea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boxofficemojo.com/title/tt0499549/?ref_=bo_cso_table_1" xlink:type="simple">Avatar</text:a></text:p>
          </table:table-cell>
          <table:table-cell office:value-type="string" calcext:value-type="string">
            <text:p>$2,923,710,708</text:p>
          </table:table-cell>
          <table:table-cell office:value-type="string" calcext:value-type="string">
            <text:p><text:a xlink:href="https://www.boxofficemojo.com/year/world/2009/?ref_=bo_cso_table_1" xlink:type="simple">2009</text:a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boxofficemojo.com/title/tt4154796/?ref_=bo_cso_table_2" xlink:type="simple">Avengers: Endgame</text:a></text:p>
          </table:table-cell>
          <table:table-cell office:value-type="string" calcext:value-type="string">
            <text:p>$2,799,439,100</text:p>
          </table:table-cell>
          <table:table-cell office:value-type="string" calcext:value-type="string">
            <text:p><text:a xlink:href="https://www.boxofficemojo.com/year/world/2019/?ref_=bo_cso_table_2" xlink:type="simple">2019</text:a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boxofficemojo.com/title/tt1630029/?ref_=bo_cso_table_3" xlink:type="simple">Avatar: The Way of Water</text:a></text:p>
          </table:table-cell>
          <table:table-cell office:value-type="string" calcext:value-type="string">
            <text:p>$2,334,484,620</text:p>
          </table:table-cell>
          <table:table-cell office:value-type="string" calcext:value-type="string">
            <text:p><text:a xlink:href="https://www.boxofficemojo.com/year/world/2022/?ref_=bo_cso_table_3" xlink:type="simple">2022</text:a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boxofficemojo.com/title/tt0120338/?ref_=bo_cso_table_4" xlink:type="simple">Titanic</text:a></text:p>
          </table:table-cell>
          <table:table-cell office:value-type="string" calcext:value-type="string">
            <text:p>$2,264,812,968</text:p>
          </table:table-cell>
          <table:table-cell office:value-type="string" calcext:value-type="string">
            <text:p><text:a xlink:href="https://www.boxofficemojo.com/year/world/1997/?ref_=bo_cso_table_4" xlink:type="simple">1997</text:a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boxofficemojo.com/title/tt34956443/?ref_=bo_cso_table_5" xlink:type="simple">Ne Zha 2</text:a></text:p>
          </table:table-cell>
          <table:table-cell office:value-type="string" calcext:value-type="string">
            <text:p>$2,259,822,417</text:p>
          </table:table-cell>
          <table:table-cell office:value-type="string" calcext:value-type="string">
            <text:p><text:a xlink:href="https://www.boxofficemojo.com/year/world/2025/?ref_=bo_cso_table_5" xlink:type="simple">2025</text:a>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boxofficemojo.com/title/tt2488496/?ref_=bo_cso_table_6" xlink:type="simple">Star Wars: Episode VII - The Force Awakens</text:a></text:p>
          </table:table-cell>
          <table:table-cell office:value-type="string" calcext:value-type="string">
            <text:p>$2,071,310,218</text:p>
          </table:table-cell>
          <table:table-cell office:value-type="string" calcext:value-type="string">
            <text:p><text:a xlink:href="https://www.boxofficemojo.com/year/world/2015/?ref_=bo_cso_table_6" xlink:type="simple">2015</text:a>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boxofficemojo.com/title/tt4154756/?ref_=bo_cso_table_7" xlink:type="simple">Avengers: Infinity War</text:a></text:p>
          </table:table-cell>
          <table:table-cell office:value-type="string" calcext:value-type="string">
            <text:p>$2,052,415,039</text:p>
          </table:table-cell>
          <table:table-cell office:value-type="string" calcext:value-type="string">
            <text:p><text:a xlink:href="https://www.boxofficemojo.com/year/world/2018/?ref_=bo_cso_table_7" xlink:type="simple">2018</text:a>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boxofficemojo.com/title/tt10872600/?ref_=bo_cso_table_8" xlink:type="simple">Spider-Man: No Way Home</text:a></text:p>
          </table:table-cell>
          <table:table-cell office:value-type="string" calcext:value-type="string">
            <text:p>$1,921,426,073</text:p>
          </table:table-cell>
          <table:table-cell office:value-type="string" calcext:value-type="string">
            <text:p><text:a xlink:href="https://www.boxofficemojo.com/year/world/2021/?ref_=bo_cso_table_8" xlink:type="simple">2021</text:a>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boxofficemojo.com/title/tt26443597/?ref_=bo_cso_table_9" xlink:type="simple">Zootopia 2</text:a></text:p>
          </table:table-cell>
          <table:table-cell office:value-type="string" calcext:value-type="string">
            <text:p>$1,833,593,716</text:p>
          </table:table-cell>
          <table:table-cell office:value-type="string" calcext:value-type="string">
            <text:p><text:a xlink:href="https://www.boxofficemojo.com/year/world/2025/?ref_=bo_cso_table_9" xlink:type="simple">2025</text:a>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boxofficemojo.com/title/tt22022452/?ref_=bo_cso_table_10" xlink:type="simple">Inside Out 2</text:a></text:p>
          </table:table-cell>
          <table:table-cell office:value-type="string" calcext:value-type="string">
            <text:p>$1,698,863,816</text:p>
          </table:table-cell>
          <table:table-cell office:value-type="string" calcext:value-type="string">
            <text:p><text:a xlink:href="https://www.boxofficemojo.com/year/world/2024/?ref_=bo_cso_table_10" xlink:type="simple">2024</text:a>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boxofficemojo.com/title/tt0369610/?ref_=bo_cso_table_11" xlink:type="simple">Jurassic World</text:a></text:p>
          </table:table-cell>
          <table:table-cell office:value-type="string" calcext:value-type="string">
            <text:p>$1,671,537,444</text:p>
          </table:table-cell>
          <table:table-cell office:value-type="string" calcext:value-type="string">
            <text:p><text:a xlink:href="https://www.boxofficemojo.com/year/world/2015/?ref_=bo_cso_table_11" xlink:type="simple">2015</text:a>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boxofficemojo.com/title/tt6105098/?ref_=bo_cso_table_12" xlink:type="simple">The Lion King</text:a></text:p>
          </table:table-cell>
          <table:table-cell office:value-type="string" calcext:value-type="string">
            <text:p>$1,662,020,819</text:p>
          </table:table-cell>
          <table:table-cell office:value-type="string" calcext:value-type="string">
            <text:p><text:a xlink:href="https://www.boxofficemojo.com/year/world/2019/?ref_=bo_cso_table_12" xlink:type="simple">2019</text:a>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boxofficemojo.com/title/tt0848228/?ref_=bo_cso_table_13" xlink:type="simple">The Avengers</text:a></text:p>
          </table:table-cell>
          <table:table-cell office:value-type="string" calcext:value-type="string">
            <text:p>$1,520,538,536</text:p>
          </table:table-cell>
          <table:table-cell office:value-type="string" calcext:value-type="string">
            <text:p><text:a xlink:href="https://www.boxofficemojo.com/year/world/2012/?ref_=bo_cso_table_13" xlink:type="simple">2012</text:a>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boxofficemojo.com/title/tt2820852/?ref_=bo_cso_table_14" xlink:type="simple">Furious 7</text:a></text:p>
          </table:table-cell>
          <table:table-cell office:value-type="string" calcext:value-type="string">
            <text:p>$1,515,342,457</text:p>
          </table:table-cell>
          <table:table-cell office:value-type="string" calcext:value-type="string">
            <text:p><text:a xlink:href="https://www.boxofficemojo.com/year/world/2015/?ref_=bo_cso_table_14" xlink:type="simple">2015</text:a>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boxofficemojo.com/title/tt1745960/?ref_=bo_cso_table_15" xlink:type="simple">Top Gun: Maverick</text:a></text:p>
          </table:table-cell>
          <table:table-cell office:value-type="string" calcext:value-type="string">
            <text:p>$1,495,696,292</text:p>
          </table:table-cell>
          <table:table-cell office:value-type="string" calcext:value-type="string">
            <text:p><text:a xlink:href="https://www.boxofficemojo.com/year/world/2022/?ref_=bo_cso_table_15" xlink:type="simple">2022</text:a>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boxofficemojo.com/title/tt1757678/?ref_=bo_cso_table_16" xlink:type="simple">Avatar: Fire and Ash</text:a></text:p>
          </table:table-cell>
          <table:table-cell office:value-type="string" calcext:value-type="string">
            <text:p>$1,462,610,357</text:p>
          </table:table-cell>
          <table:table-cell office:value-type="string" calcext:value-type="string">
            <text:p><text:a xlink:href="https://www.boxofficemojo.com/year/world/2025/?ref_=bo_cso_table_16" xlink:type="simple">2025</text:a>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boxofficemojo.com/title/tt4520988/?ref_=bo_cso_table_17" xlink:type="simple">Frozen II</text:a></text:p>
          </table:table-cell>
          <table:table-cell office:value-type="string" calcext:value-type="string">
            <text:p>$1,453,683,476</text:p>
          </table:table-cell>
          <table:table-cell office:value-type="string" calcext:value-type="string">
            <text:p><text:a xlink:href="https://www.boxofficemojo.com/year/world/2019/?ref_=bo_cso_table_17" xlink:type="simple">2019</text:a>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boxofficemojo.com/title/tt1517268/?ref_=bo_cso_table_18" xlink:type="simple">Barbie</text:a></text:p>
          </table:table-cell>
          <table:table-cell office:value-type="string" calcext:value-type="string">
            <text:p>$1,447,138,421</text:p>
          </table:table-cell>
          <table:table-cell office:value-type="string" calcext:value-type="string">
            <text:p><text:a xlink:href="https://www.boxofficemojo.com/year/world/2023/?ref_=bo_cso_table_18" xlink:type="simple">2023</text:a>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boxofficemojo.com/title/tt2395427/?ref_=bo_cso_table_19" xlink:type="simple">Avengers: Age of Ultron</text:a></text:p>
          </table:table-cell>
          <table:table-cell office:value-type="string" calcext:value-type="string">
            <text:p>$1,405,018,048</text:p>
          </table:table-cell>
          <table:table-cell office:value-type="string" calcext:value-type="string">
            <text:p><text:a xlink:href="https://www.boxofficemojo.com/year/world/2015/?ref_=bo_cso_table_19" xlink:type="simple">2015</text:a>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boxofficemojo.com/title/tt6718170/?ref_=bo_cso_table_20" xlink:type="simple">The Super Mario Bros. Movie</text:a></text:p>
          </table:table-cell>
          <table:table-cell office:value-type="string" calcext:value-type="string">
            <text:p>$1,360,879,735</text:p>
          </table:table-cell>
          <table:table-cell office:value-type="string" calcext:value-type="string">
            <text:p><text:a xlink:href="https://www.boxofficemojo.com/year/world/2023/?ref_=bo_cso_table_20" xlink:type="simple">2023</text:a>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www.boxofficemojo.com/title/tt1825683/?ref_=bo_cso_table_21" xlink:type="simple">Black Panther</text:a></text:p>
          </table:table-cell>
          <table:table-cell office:value-type="string" calcext:value-type="string">
            <text:p>$1,349,926,083</text:p>
          </table:table-cell>
          <table:table-cell office:value-type="string" calcext:value-type="string">
            <text:p><text:a xlink:href="https://www.boxofficemojo.com/year/world/2018/?ref_=bo_cso_table_21" xlink:type="simple">2018</text:a>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www.boxofficemojo.com/title/tt1201607/?ref_=bo_cso_table_22" xlink:type="simple">Harry Potter and the Deathly Hallows: Part 2</text:a></text:p>
          </table:table-cell>
          <table:table-cell office:value-type="string" calcext:value-type="string">
            <text:p>$1,342,942,050</text:p>
          </table:table-cell>
          <table:table-cell office:value-type="string" calcext:value-type="string">
            <text:p><text:a xlink:href="https://www.boxofficemojo.com/year/world/2011/?ref_=bo_cso_table_22" xlink:type="simple">2011</text:a>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boxofficemojo.com/title/tt6263850/?ref_=bo_cso_table_23" xlink:type="simple">Deadpool &amp; Wolverine</text:a></text:p>
          </table:table-cell>
          <table:table-cell office:value-type="string" calcext:value-type="string">
            <text:p>$1,338,073,645</text:p>
          </table:table-cell>
          <table:table-cell office:value-type="string" calcext:value-type="string">
            <text:p><text:a xlink:href="https://www.boxofficemojo.com/year/world/2024/?ref_=bo_cso_table_23" xlink:type="simple">2024</text:a>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boxofficemojo.com/title/tt2527336/?ref_=bo_cso_table_24" xlink:type="simple">Star Wars: Episode VIII - The Last Jedi</text:a></text:p>
          </table:table-cell>
          <table:table-cell office:value-type="string" calcext:value-type="string">
            <text:p>$1,334,407,706</text:p>
          </table:table-cell>
          <table:table-cell office:value-type="string" calcext:value-type="string">
            <text:p><text:a xlink:href="https://www.boxofficemojo.com/year/world/2017/?ref_=bo_cso_table_24" xlink:type="simple">2017</text:a>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boxofficemojo.com/title/tt4881806/?ref_=bo_cso_table_25" xlink:type="simple">Jurassic World: Fallen Kingdom</text:a></text:p>
          </table:table-cell>
          <table:table-cell office:value-type="string" calcext:value-type="string">
            <text:p>$1,308,566,455</text:p>
          </table:table-cell>
          <table:table-cell office:value-type="string" calcext:value-type="string">
            <text:p><text:a xlink:href="https://www.boxofficemojo.com/year/world/2018/?ref_=bo_cso_table_25" xlink:type="simple">2018</text:a>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www.boxofficemojo.com/title/tt2294629/?ref_=bo_cso_table_26" xlink:type="simple">Frozen</text:a></text:p>
          </table:table-cell>
          <table:table-cell office:value-type="string" calcext:value-type="string">
            <text:p>$1,286,513,286</text:p>
          </table:table-cell>
          <table:table-cell office:value-type="string" calcext:value-type="string">
            <text:p><text:a xlink:href="https://www.boxofficemojo.com/year/world/2013/?ref_=bo_cso_table_26" xlink:type="simple">2013</text:a>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boxofficemojo.com/title/tt2771200/?ref_=bo_cso_table_27" xlink:type="simple">Beauty and the Beast</text:a></text:p>
          </table:table-cell>
          <table:table-cell office:value-type="string" calcext:value-type="string">
            <text:p>$1,266,115,964</text:p>
          </table:table-cell>
          <table:table-cell office:value-type="string" calcext:value-type="string">
            <text:p><text:a xlink:href="https://www.boxofficemojo.com/year/world/2017/?ref_=bo_cso_table_27" xlink:type="simple">2017</text:a>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boxofficemojo.com/title/tt3606756/?ref_=bo_cso_table_28" xlink:type="simple">Incredibles 2</text:a></text:p>
          </table:table-cell>
          <table:table-cell office:value-type="string" calcext:value-type="string">
            <text:p>$1,243,225,667</text:p>
          </table:table-cell>
          <table:table-cell office:value-type="string" calcext:value-type="string">
            <text:p><text:a xlink:href="https://www.boxofficemojo.com/year/world/2018/?ref_=bo_cso_table_28" xlink:type="simple">2018</text:a>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www.boxofficemojo.com/title/tt4630562/?ref_=bo_cso_table_29" xlink:type="simple">The Fate of the Furious</text:a></text:p>
          </table:table-cell>
          <table:table-cell office:value-type="string" calcext:value-type="string">
            <text:p>$1,236,009,236</text:p>
          </table:table-cell>
          <table:table-cell office:value-type="string" calcext:value-type="string">
            <text:p><text:a xlink:href="https://www.boxofficemojo.com/year/world/2017/?ref_=bo_cso_table_29" xlink:type="simple">2017</text:a>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ww.boxofficemojo.com/title/tt1300854/?ref_=bo_cso_table_30" xlink:type="simple">Iron Man 3</text:a></text:p>
          </table:table-cell>
          <table:table-cell office:value-type="string" calcext:value-type="string">
            <text:p>$1,215,577,205</text:p>
          </table:table-cell>
          <table:table-cell office:value-type="string" calcext:value-type="string">
            <text:p><text:a xlink:href="https://www.boxofficemojo.com/year/world/2013/?ref_=bo_cso_table_30" xlink:type="simple">2013</text:a>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www.boxofficemojo.com/title/tt2293640/?ref_=bo_cso_table_31" xlink:type="simple">Minions</text:a></text:p>
          </table:table-cell>
          <table:table-cell office:value-type="string" calcext:value-type="string">
            <text:p>$1,159,457,503</text:p>
          </table:table-cell>
          <table:table-cell office:value-type="string" calcext:value-type="string">
            <text:p><text:a xlink:href="https://www.boxofficemojo.com/year/world/2015/?ref_=bo_cso_table_31" xlink:type="simple">2015</text:a>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www.boxofficemojo.com/title/tt3498820/?ref_=bo_cso_table_32" xlink:type="simple">Captain America: Civil War</text:a></text:p>
          </table:table-cell>
          <table:table-cell office:value-type="string" calcext:value-type="string">
            <text:p>$1,155,046,416</text:p>
          </table:table-cell>
          <table:table-cell office:value-type="string" calcext:value-type="string">
            <text:p><text:a xlink:href="https://www.boxofficemojo.com/year/world/2016/?ref_=bo_cso_table_32" xlink:type="simple">2016</text:a>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www.boxofficemojo.com/title/tt1477834/?ref_=bo_cso_table_33" xlink:type="simple">Aquaman</text:a></text:p>
          </table:table-cell>
          <table:table-cell office:value-type="string" calcext:value-type="string">
            <text:p>$1,152,028,393</text:p>
          </table:table-cell>
          <table:table-cell office:value-type="string" calcext:value-type="string">
            <text:p><text:a xlink:href="https://www.boxofficemojo.com/year/world/2018/?ref_=bo_cso_table_33" xlink:type="simple">2018</text:a>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www.boxofficemojo.com/title/tt0167260/?ref_=bo_cso_table_34" xlink:type="simple">The Lord of the Rings: The Return of the King</text:a></text:p>
          </table:table-cell>
          <table:table-cell office:value-type="string" calcext:value-type="string">
            <text:p>$1,148,812,312</text:p>
          </table:table-cell>
          <table:table-cell office:value-type="string" calcext:value-type="string">
            <text:p><text:a xlink:href="https://www.boxofficemojo.com/year/world/2003/?ref_=bo_cso_table_34" xlink:type="simple">2003</text:a>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www.boxofficemojo.com/title/tt6320628/?ref_=bo_cso_table_35" xlink:type="simple">Spider-Man: Far from Home</text:a></text:p>
          </table:table-cell>
          <table:table-cell office:value-type="string" calcext:value-type="string">
            <text:p>$1,132,723,226</text:p>
          </table:table-cell>
          <table:table-cell office:value-type="string" calcext:value-type="string">
            <text:p><text:a xlink:href="https://www.boxofficemojo.com/year/world/2019/?ref_=bo_cso_table_35" xlink:type="simple">2019</text:a>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boxofficemojo.com/title/tt4154664/?ref_=bo_cso_table_36" xlink:type="simple">Captain Marvel</text:a></text:p>
          </table:table-cell>
          <table:table-cell office:value-type="string" calcext:value-type="string">
            <text:p>$1,131,416,446</text:p>
          </table:table-cell>
          <table:table-cell office:value-type="string" calcext:value-type="string">
            <text:p><text:a xlink:href="https://www.boxofficemojo.com/year/world/2019/?ref_=bo_cso_table_36" xlink:type="simple">2019</text:a>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www.boxofficemojo.com/title/tt1399103/?ref_=bo_cso_table_37" xlink:type="simple">Transformers: Dark of the Moon</text:a></text:p>
          </table:table-cell>
          <table:table-cell office:value-type="string" calcext:value-type="string">
            <text:p>$1,123,794,079</text:p>
          </table:table-cell>
          <table:table-cell office:value-type="string" calcext:value-type="string">
            <text:p><text:a xlink:href="https://www.boxofficemojo.com/year/world/2011/?ref_=bo_cso_table_37" xlink:type="simple">2011</text:a>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www.boxofficemojo.com/title/tt1074638/?ref_=bo_cso_table_38" xlink:type="simple">Skyfall</text:a></text:p>
          </table:table-cell>
          <table:table-cell office:value-type="string" calcext:value-type="string">
            <text:p>$1,108,594,137</text:p>
          </table:table-cell>
          <table:table-cell office:value-type="string" calcext:value-type="string">
            <text:p><text:a xlink:href="https://www.boxofficemojo.com/year/world/2012/?ref_=bo_cso_table_38" xlink:type="simple">2012</text:a>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www.boxofficemojo.com/title/tt2109248/?ref_=bo_cso_table_39" xlink:type="simple">Transformers: Age of Extinction</text:a></text:p>
          </table:table-cell>
          <table:table-cell office:value-type="string" calcext:value-type="string">
            <text:p>$1,105,261,713</text:p>
          </table:table-cell>
          <table:table-cell office:value-type="string" calcext:value-type="string">
            <text:p><text:a xlink:href="https://www.boxofficemojo.com/year/world/2014/?ref_=bo_cso_table_39" xlink:type="simple">2014</text:a>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ww.boxofficemojo.com/title/tt0107290/?ref_=bo_cso_table_40" xlink:type="simple">Jurassic Park</text:a></text:p>
          </table:table-cell>
          <table:table-cell office:value-type="string" calcext:value-type="string">
            <text:p>$1,103,110,411</text:p>
          </table:table-cell>
          <table:table-cell office:value-type="string" calcext:value-type="string">
            <text:p><text:a xlink:href="https://www.boxofficemojo.com/year/world/1993/?ref_=bo_cso_table_40" xlink:type="simple">1993</text:a>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boxofficemojo.com/title/tt1345836/?ref_=bo_cso_table_41" xlink:type="simple">The Dark Knight Rises</text:a></text:p>
          </table:table-cell>
          <table:table-cell office:value-type="string" calcext:value-type="string">
            <text:p>$1,085,429,532</text:p>
          </table:table-cell>
          <table:table-cell office:value-type="string" calcext:value-type="string">
            <text:p><text:a xlink:href="https://www.boxofficemojo.com/year/world/2012/?ref_=bo_cso_table_41" xlink:type="simple">2012</text:a>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www.boxofficemojo.com/title/tt7286456/?ref_=bo_cso_table_42" xlink:type="simple">Joker</text:a></text:p>
          </table:table-cell>
          <table:table-cell office:value-type="string" calcext:value-type="string">
            <text:p>$1,078,958,629</text:p>
          </table:table-cell>
          <table:table-cell office:value-type="string" calcext:value-type="string">
            <text:p><text:a xlink:href="https://www.boxofficemojo.com/year/world/2019/?ref_=bo_cso_table_42" xlink:type="simple">2019</text:a>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www.boxofficemojo.com/title/tt2527338/?ref_=bo_cso_table_43" xlink:type="simple">Star Wars: Episode IX - The Rise of Skywalker</text:a></text:p>
          </table:table-cell>
          <table:table-cell office:value-type="string" calcext:value-type="string">
            <text:p>$1,077,022,372</text:p>
          </table:table-cell>
          <table:table-cell office:value-type="string" calcext:value-type="string">
            <text:p><text:a xlink:href="https://www.boxofficemojo.com/year/world/2019/?ref_=bo_cso_table_43" xlink:type="simple">2019</text:a>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www.boxofficemojo.com/title/tt1979376/?ref_=bo_cso_table_44" xlink:type="simple">Toy Story 4</text:a></text:p>
          </table:table-cell>
          <table:table-cell office:value-type="string" calcext:value-type="string">
            <text:p>$1,073,841,394</text:p>
          </table:table-cell>
          <table:table-cell office:value-type="string" calcext:value-type="string">
            <text:p><text:a xlink:href="https://www.boxofficemojo.com/year/world/2019/?ref_=bo_cso_table_44" xlink:type="simple">2019</text:a>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www.boxofficemojo.com/title/tt0435761/?ref_=bo_cso_table_45" xlink:type="simple">Toy Story 3</text:a></text:p>
          </table:table-cell>
          <table:table-cell office:value-type="string" calcext:value-type="string">
            <text:p>$1,067,316,101</text:p>
          </table:table-cell>
          <table:table-cell office:value-type="string" calcext:value-type="string">
            <text:p><text:a xlink:href="https://www.boxofficemojo.com/year/world/2010/?ref_=bo_cso_table_45" xlink:type="simple">2010</text:a>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www.boxofficemojo.com/title/tt0383574/?ref_=bo_cso_table_46" xlink:type="simple">Pirates of the Caribbean: Dead Man's Chest</text:a></text:p>
          </table:table-cell>
          <table:table-cell office:value-type="string" calcext:value-type="string">
            <text:p>$1,066,179,747</text:p>
          </table:table-cell>
          <table:table-cell office:value-type="string" calcext:value-type="string">
            <text:p><text:a xlink:href="https://www.boxofficemojo.com/year/world/2006/?ref_=bo_cso_table_46" xlink:type="simple">2006</text:a>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www.boxofficemojo.com/title/tt13622970/?ref_=bo_cso_table_47" xlink:type="simple">Moana 2</text:a></text:p>
          </table:table-cell>
          <table:table-cell office:value-type="string" calcext:value-type="string">
            <text:p>$1,059,242,164</text:p>
          </table:table-cell>
          <table:table-cell office:value-type="string" calcext:value-type="string">
            <text:p><text:a xlink:href="https://www.boxofficemojo.com/year/world/2024/?ref_=bo_cso_table_47" xlink:type="simple">2024</text:a>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www.boxofficemojo.com/title/tt3748528/?ref_=bo_cso_table_48" xlink:type="simple">Rogue One: A Star Wars Story</text:a></text:p>
          </table:table-cell>
          <table:table-cell office:value-type="string" calcext:value-type="string">
            <text:p>$1,058,684,742</text:p>
          </table:table-cell>
          <table:table-cell office:value-type="string" calcext:value-type="string">
            <text:p><text:a xlink:href="https://www.boxofficemojo.com/year/world/2016/?ref_=bo_cso_table_48" xlink:type="simple">2016</text:a>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www.boxofficemojo.com/title/tt6139732/?ref_=bo_cso_table_49" xlink:type="simple">Aladdin</text:a></text:p>
          </table:table-cell>
          <table:table-cell office:value-type="string" calcext:value-type="string">
            <text:p>$1,054,304,000</text:p>
          </table:table-cell>
          <table:table-cell office:value-type="string" calcext:value-type="string">
            <text:p><text:a xlink:href="https://www.boxofficemojo.com/year/world/2019/?ref_=bo_cso_table_49" xlink:type="simple">2019</text:a>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ww.boxofficemojo.com/title/tt1298650/?ref_=bo_cso_table_50" xlink:type="simple">Pirates of the Caribbean: On Stranger Tides</text:a></text:p>
          </table:table-cell>
          <table:table-cell office:value-type="string" calcext:value-type="string">
            <text:p>$1,046,721,266</text:p>
          </table:table-cell>
          <table:table-cell office:value-type="string" calcext:value-type="string">
            <text:p><text:a xlink:href="https://www.boxofficemojo.com/year/world/2011/?ref_=bo_cso_table_50" xlink:type="simple">2011</text:a>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www.boxofficemojo.com/title/tt0120915/?ref_=bo_cso_table_51" xlink:type="simple">Star Wars: Episode I - The Phantom Menace</text:a></text:p>
          </table:table-cell>
          <table:table-cell office:value-type="string" calcext:value-type="string">
            <text:p>$1,046,515,409</text:p>
          </table:table-cell>
          <table:table-cell office:value-type="string" calcext:value-type="string">
            <text:p><text:a xlink:href="https://www.boxofficemojo.com/year/world/1999/?ref_=bo_cso_table_51" xlink:type="simple">1999</text:a>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www.boxofficemojo.com/title/tt11655566/?ref_=bo_cso_table_52" xlink:type="simple">Lilo &amp; Stitch</text:a></text:p>
          </table:table-cell>
          <table:table-cell office:value-type="string" calcext:value-type="string">
            <text:p>$1,038,027,526</text:p>
          </table:table-cell>
          <table:table-cell office:value-type="string" calcext:value-type="string">
            <text:p><text:a xlink:href="https://www.boxofficemojo.com/year/world/2025/?ref_=bo_cso_table_52" xlink:type="simple">2025</text:a>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www.boxofficemojo.com/title/tt3469046/?ref_=bo_cso_table_53" xlink:type="simple">Despicable Me 3</text:a></text:p>
          </table:table-cell>
          <table:table-cell office:value-type="string" calcext:value-type="string">
            <text:p>$1,034,800,131</text:p>
          </table:table-cell>
          <table:table-cell office:value-type="string" calcext:value-type="string">
            <text:p><text:a xlink:href="https://www.boxofficemojo.com/year/world/2017/?ref_=bo_cso_table_53" xlink:type="simple">2017</text:a>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www.boxofficemojo.com/title/tt0241527/?ref_=bo_cso_table_54" xlink:type="simple">Harry Potter and the Sorcerer's Stone</text:a></text:p>
          </table:table-cell>
          <table:table-cell office:value-type="string" calcext:value-type="string">
            <text:p>$1,029,374,615</text:p>
          </table:table-cell>
          <table:table-cell office:value-type="string" calcext:value-type="string">
            <text:p><text:a xlink:href="https://www.boxofficemojo.com/year/world/2001/?ref_=bo_cso_table_54" xlink:type="simple">2001</text:a>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www.boxofficemojo.com/title/tt2277860/?ref_=bo_cso_table_55" xlink:type="simple">Finding Dory</text:a></text:p>
          </table:table-cell>
          <table:table-cell office:value-type="string" calcext:value-type="string">
            <text:p>$1,029,266,989</text:p>
          </table:table-cell>
          <table:table-cell office:value-type="string" calcext:value-type="string">
            <text:p><text:a xlink:href="https://www.boxofficemojo.com/year/world/2016/?ref_=bo_cso_table_55" xlink:type="simple">2016</text:a>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www.boxofficemojo.com/title/tt2948356/?ref_=bo_cso_table_56" xlink:type="simple">Zootopia</text:a></text:p>
          </table:table-cell>
          <table:table-cell office:value-type="string" calcext:value-type="string">
            <text:p>$1,025,521,689</text:p>
          </table:table-cell>
          <table:table-cell office:value-type="string" calcext:value-type="string">
            <text:p><text:a xlink:href="https://www.boxofficemojo.com/year/world/2016/?ref_=bo_cso_table_56" xlink:type="simple">2016</text:a>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www.boxofficemojo.com/title/tt1014759/?ref_=bo_cso_table_57" xlink:type="simple">Alice in Wonderland</text:a></text:p>
          </table:table-cell>
          <table:table-cell office:value-type="string" calcext:value-type="string">
            <text:p>$1,025,468,216</text:p>
          </table:table-cell>
          <table:table-cell office:value-type="string" calcext:value-type="string">
            <text:p><text:a xlink:href="https://www.boxofficemojo.com/year/world/2010/?ref_=bo_cso_table_57" xlink:type="simple">2010</text:a>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www.boxofficemojo.com/title/tt0903624/?ref_=bo_cso_table_58" xlink:type="simple">The Hobbit: An Unexpected Journey</text:a></text:p>
          </table:table-cell>
          <table:table-cell office:value-type="string" calcext:value-type="string">
            <text:p>$1,017,453,991</text:p>
          </table:table-cell>
          <table:table-cell office:value-type="string" calcext:value-type="string">
            <text:p><text:a xlink:href="https://www.boxofficemojo.com/year/world/2012/?ref_=bo_cso_table_58" xlink:type="simple">2012</text:a>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www.boxofficemojo.com/title/tt0468569/?ref_=bo_cso_table_59" xlink:type="simple">The Dark Knight</text:a></text:p>
          </table:table-cell>
          <table:table-cell office:value-type="string" calcext:value-type="string">
            <text:p>$1,008,477,382</text:p>
          </table:table-cell>
          <table:table-cell office:value-type="string" calcext:value-type="string">
            <text:p><text:a xlink:href="https://www.boxofficemojo.com/year/world/2008/?ref_=bo_cso_table_59" xlink:type="simple">2008</text:a>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boxofficemojo.com/title/tt8041270/?ref_=bo_cso_table_60" xlink:type="simple">Jurassic World: Dominion</text:a></text:p>
          </table:table-cell>
          <table:table-cell office:value-type="string" calcext:value-type="string">
            <text:p>$1,001,978,080</text:p>
          </table:table-cell>
          <table:table-cell office:value-type="string" calcext:value-type="string">
            <text:p><text:a xlink:href="https://www.boxofficemojo.com/year/world/2022/?ref_=bo_cso_table_60" xlink:type="simple">2022</text:a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www.boxofficemojo.com/title/tt0110357/?ref_=bo_cso_table_61" xlink:type="simple">The Lion King</text:a></text:p>
          </table:table-cell>
          <table:table-cell office:value-type="string" calcext:value-type="string">
            <text:p>$979,161,632</text:p>
          </table:table-cell>
          <table:table-cell office:value-type="string" calcext:value-type="string">
            <text:p><text:a xlink:href="https://www.boxofficemojo.com/year/world/1994/?ref_=bo_cso_table_61" xlink:type="simple">1994</text:a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www.boxofficemojo.com/title/tt15398776/?ref_=bo_cso_table_62" xlink:type="simple">Oppenheimer</text:a></text:p>
          </table:table-cell>
          <table:table-cell office:value-type="string" calcext:value-type="string">
            <text:p>$975,811,333</text:p>
          </table:table-cell>
          <table:table-cell office:value-type="string" calcext:value-type="string">
            <text:p><text:a xlink:href="https://www.boxofficemojo.com/year/world/2023/?ref_=bo_cso_table_62" xlink:type="simple">2023</text:a>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www.boxofficemojo.com/title/tt7510222/?ref_=bo_cso_table_63" xlink:type="simple">Despicable Me 4</text:a></text:p>
          </table:table-cell>
          <table:table-cell office:value-type="string" calcext:value-type="string">
            <text:p>$972,021,410</text:p>
          </table:table-cell>
          <table:table-cell office:value-type="string" calcext:value-type="string">
            <text:p><text:a xlink:href="https://www.boxofficemojo.com/year/world/2024/?ref_=bo_cso_table_63" xlink:type="simple">2024</text:a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www.boxofficemojo.com/title/tt1690953/?ref_=bo_cso_table_64" xlink:type="simple">Despicable Me 2</text:a></text:p>
          </table:table-cell>
          <table:table-cell office:value-type="string" calcext:value-type="string">
            <text:p>$970,766,005</text:p>
          </table:table-cell>
          <table:table-cell office:value-type="string" calcext:value-type="string">
            <text:p><text:a xlink:href="https://www.boxofficemojo.com/year/world/2013/?ref_=bo_cso_table_64" xlink:type="simple">2013</text:a>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ww.boxofficemojo.com/title/tt3040964/?ref_=bo_cso_table_65" xlink:type="simple">The Jungle Book</text:a></text:p>
          </table:table-cell>
          <table:table-cell office:value-type="string" calcext:value-type="string">
            <text:p>$967,724,775</text:p>
          </table:table-cell>
          <table:table-cell office:value-type="string" calcext:value-type="string">
            <text:p><text:a xlink:href="https://www.boxofficemojo.com/year/world/2016/?ref_=bo_cso_table_65" xlink:type="simple">2016</text:a>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www.boxofficemojo.com/title/tt2310332/?ref_=bo_cso_table_66" xlink:type="simple">The Hobbit: The Battle of the Five Armies</text:a></text:p>
          </table:table-cell>
          <table:table-cell office:value-type="string" calcext:value-type="string">
            <text:p>$962,749,443</text:p>
          </table:table-cell>
          <table:table-cell office:value-type="string" calcext:value-type="string">
            <text:p><text:a xlink:href="https://www.boxofficemojo.com/year/world/2014/?ref_=bo_cso_table_66" xlink:type="simple">2014</text:a>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www.boxofficemojo.com/title/tt2283362/?ref_=bo_cso_table_67" xlink:type="simple">Jumanji: Welcome to the Jungle</text:a></text:p>
          </table:table-cell>
          <table:table-cell office:value-type="string" calcext:value-type="string">
            <text:p>$962,544,585</text:p>
          </table:table-cell>
          <table:table-cell office:value-type="string" calcext:value-type="string">
            <text:p><text:a xlink:href="https://www.boxofficemojo.com/year/world/2017/?ref_=bo_cso_table_67" xlink:type="simple">2017</text:a>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www.boxofficemojo.com/title/tt0449088/?ref_=bo_cso_table_68" xlink:type="simple">Pirates of the Caribbean: At World's End</text:a></text:p>
          </table:table-cell>
          <table:table-cell office:value-type="string" calcext:value-type="string">
            <text:p>$961,691,209</text:p>
          </table:table-cell>
          <table:table-cell office:value-type="string" calcext:value-type="string">
            <text:p><text:a xlink:href="https://www.boxofficemojo.com/year/world/2007/?ref_=bo_cso_table_68" xlink:type="simple">2007</text:a>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www.boxofficemojo.com/title/tt3566834/?ref_=bo_cso_table_69" xlink:type="simple">A Minecraft Movie</text:a></text:p>
          </table:table-cell>
          <table:table-cell office:value-type="string" calcext:value-type="string">
            <text:p>$961,187,780</text:p>
          </table:table-cell>
          <table:table-cell office:value-type="string" calcext:value-type="string">
            <text:p><text:a xlink:href="https://www.boxofficemojo.com/year/world/2025/?ref_=bo_cso_table_69" xlink:type="simple">2025</text:a>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www.boxofficemojo.com/title/tt0926084/?ref_=bo_cso_table_70" xlink:type="simple">Harry Potter and the Deathly Hallows: Part 1</text:a></text:p>
          </table:table-cell>
          <table:table-cell office:value-type="string" calcext:value-type="string">
            <text:p>$960,858,478</text:p>
          </table:table-cell>
          <table:table-cell office:value-type="string" calcext:value-type="string">
            <text:p><text:a xlink:href="https://www.boxofficemojo.com/year/world/2010/?ref_=bo_cso_table_70" xlink:type="simple">2010</text:a>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www.boxofficemojo.com/title/tt1170358/?ref_=bo_cso_table_71" xlink:type="simple">The Hobbit: The Desolation of Smaug</text:a></text:p>
          </table:table-cell>
          <table:table-cell office:value-type="string" calcext:value-type="string">
            <text:p>$959,079,095</text:p>
          </table:table-cell>
          <table:table-cell office:value-type="string" calcext:value-type="string">
            <text:p><text:a xlink:href="https://www.boxofficemojo.com/year/world/2013/?ref_=bo_cso_table_71" xlink:type="simple">2013</text:a>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www.boxofficemojo.com/title/tt9419884/?ref_=bo_cso_table_72" xlink:type="simple">Doctor Strange in the Multiverse of Madness</text:a></text:p>
          </table:table-cell>
          <table:table-cell office:value-type="string" calcext:value-type="string">
            <text:p>$955,775,804</text:p>
          </table:table-cell>
          <table:table-cell office:value-type="string" calcext:value-type="string">
            <text:p><text:a xlink:href="https://www.boxofficemojo.com/year/world/2022/?ref_=bo_cso_table_72" xlink:type="simple">2022</text:a>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www.boxofficemojo.com/title/tt0167261/?ref_=bo_cso_table_73" xlink:type="simple">The Lord of the Rings: The Two Towers</text:a></text:p>
          </table:table-cell>
          <table:table-cell office:value-type="string" calcext:value-type="string">
            <text:p>$944,677,423</text:p>
          </table:table-cell>
          <table:table-cell office:value-type="string" calcext:value-type="string">
            <text:p><text:a xlink:href="https://www.boxofficemojo.com/year/world/2002/?ref_=bo_cso_table_73" xlink:type="simple">2002</text:a>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www.boxofficemojo.com/title/tt0373889/?ref_=bo_cso_table_74" xlink:type="simple">Harry Potter and the Order of the Phoenix</text:a></text:p>
          </table:table-cell>
          <table:table-cell office:value-type="string" calcext:value-type="string">
            <text:p>$942,872,838</text:p>
          </table:table-cell>
          <table:table-cell office:value-type="string" calcext:value-type="string">
            <text:p><text:a xlink:href="https://www.boxofficemojo.com/year/world/2007/?ref_=bo_cso_table_74" xlink:type="simple">2007</text:a>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www.boxofficemojo.com/title/tt0266543/?ref_=bo_cso_table_75" xlink:type="simple">Finding Nemo</text:a></text:p>
          </table:table-cell>
          <table:table-cell office:value-type="string" calcext:value-type="string">
            <text:p>$941,637,960</text:p>
          </table:table-cell>
          <table:table-cell office:value-type="string" calcext:value-type="string">
            <text:p><text:a xlink:href="https://www.boxofficemojo.com/year/world/2003/?ref_=bo_cso_table_75" xlink:type="simple">2003</text:a>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www.boxofficemojo.com/title/tt0417741/?ref_=bo_cso_table_76" xlink:type="simple">Harry Potter and the Half-Blood Prince</text:a></text:p>
          </table:table-cell>
          <table:table-cell office:value-type="string" calcext:value-type="string">
            <text:p>$941,056,063</text:p>
          </table:table-cell>
          <table:table-cell office:value-type="string" calcext:value-type="string">
            <text:p><text:a xlink:href="https://www.boxofficemojo.com/year/world/2009/?ref_=bo_cso_table_76" xlink:type="simple">2009</text:a>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www.boxofficemojo.com/title/tt5113044/?ref_=bo_cso_table_77" xlink:type="simple">Minions: The Rise of Gru</text:a></text:p>
          </table:table-cell>
          <table:table-cell office:value-type="string" calcext:value-type="string">
            <text:p>$940,482,695</text:p>
          </table:table-cell>
          <table:table-cell office:value-type="string" calcext:value-type="string">
            <text:p><text:a xlink:href="https://www.boxofficemojo.com/year/world/2022/?ref_=bo_cso_table_77" xlink:type="simple">2022</text:a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www.boxofficemojo.com/title/tt0298148/?ref_=bo_cso_table_78" xlink:type="simple">Shrek 2</text:a></text:p>
          </table:table-cell>
          <table:table-cell office:value-type="string" calcext:value-type="string">
            <text:p>$932,536,239</text:p>
          </table:table-cell>
          <table:table-cell office:value-type="string" calcext:value-type="string">
            <text:p><text:a xlink:href="https://www.boxofficemojo.com/year/world/2004/?ref_=bo_cso_table_78" xlink:type="simple">2004</text:a>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www.boxofficemojo.com/title/tt1727824/?ref_=bo_cso_table_79" xlink:type="simple">Bohemian Rhapsody</text:a></text:p>
          </table:table-cell>
          <table:table-cell office:value-type="string" calcext:value-type="string">
            <text:p>$910,813,521</text:p>
          </table:table-cell>
          <table:table-cell office:value-type="string" calcext:value-type="string">
            <text:p><text:a xlink:href="https://www.boxofficemojo.com/year/world/2018/?ref_=bo_cso_table_79" xlink:type="simple">2018</text:a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ww.boxofficemojo.com/title/tt0121766/?ref_=bo_cso_table_80" xlink:type="simple">Star Wars: Episode III - Revenge of the Sith</text:a></text:p>
          </table:table-cell>
          <table:table-cell office:value-type="string" calcext:value-type="string">
            <text:p>$905,595,947</text:p>
          </table:table-cell>
          <table:table-cell office:value-type="string" calcext:value-type="string">
            <text:p><text:a xlink:href="https://www.boxofficemojo.com/year/world/2005/?ref_=bo_cso_table_80" xlink:type="simple">2005</text:a>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www.boxofficemojo.com/title/tt13462900/?ref_=bo_cso_table_81" xlink:type="simple">The Battle at Lake Changjin</text:a></text:p>
          </table:table-cell>
          <table:table-cell office:value-type="string" calcext:value-type="string">
            <text:p>$902,548,476</text:p>
          </table:table-cell>
          <table:table-cell office:value-type="string" calcext:value-type="string">
            <text:p><text:a xlink:href="https://www.boxofficemojo.com/year/world/2021/?ref_=bo_cso_table_81" xlink:type="simple">2021</text:a>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www.boxofficemojo.com/title/tt0330373/?ref_=bo_cso_table_82" xlink:type="simple">Harry Potter and the Goblet of Fire</text:a></text:p>
          </table:table-cell>
          <table:table-cell office:value-type="string" calcext:value-type="string">
            <text:p>$900,435,886</text:p>
          </table:table-cell>
          <table:table-cell office:value-type="string" calcext:value-type="string">
            <text:p><text:a xlink:href="https://www.boxofficemojo.com/year/world/2005/?ref_=bo_cso_table_82" xlink:type="simple">2005</text:a>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www.boxofficemojo.com/title/tt0120737/?ref_=bo_cso_table_83" xlink:type="simple">The Lord of the Rings: The Fellowship of the Ring</text:a></text:p>
          </table:table-cell>
          <table:table-cell office:value-type="string" calcext:value-type="string">
            <text:p>$896,931,290</text:p>
          </table:table-cell>
          <table:table-cell office:value-type="string" calcext:value-type="string">
            <text:p><text:a xlink:href="https://www.boxofficemojo.com/year/world/2001/?ref_=bo_cso_table_83" xlink:type="simple">2001</text:a>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www.boxofficemojo.com/title/tt0413300/?ref_=bo_cso_table_84" xlink:type="simple">Spider-Man 3</text:a></text:p>
          </table:table-cell>
          <table:table-cell office:value-type="string" calcext:value-type="string">
            <text:p>$887,404,761</text:p>
          </table:table-cell>
          <table:table-cell office:value-type="string" calcext:value-type="string">
            <text:p><text:a xlink:href="https://www.boxofficemojo.com/year/world/2007/?ref_=bo_cso_table_84" xlink:type="simple">2007</text:a>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www.boxofficemojo.com/title/tt1080016/?ref_=bo_cso_table_85" xlink:type="simple">Ice Age: Dawn of the Dinosaurs</text:a></text:p>
          </table:table-cell>
          <table:table-cell office:value-type="string" calcext:value-type="string">
            <text:p>$886,686,817</text:p>
          </table:table-cell>
          <table:table-cell office:value-type="string" calcext:value-type="string">
            <text:p><text:a xlink:href="https://www.boxofficemojo.com/year/world/2009/?ref_=bo_cso_table_85" xlink:type="simple">2009</text:a>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www.boxofficemojo.com/title/tt0295297/?ref_=bo_cso_table_86" xlink:type="simple">Harry Potter and the Chamber of Secrets</text:a></text:p>
          </table:table-cell>
          <table:table-cell office:value-type="string" calcext:value-type="string">
            <text:p>$883,386,103</text:p>
          </table:table-cell>
          <table:table-cell office:value-type="string" calcext:value-type="string">
            <text:p><text:a xlink:href="https://www.boxofficemojo.com/year/world/2002/?ref_=bo_cso_table_86" xlink:type="simple">2002</text:a>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www.boxofficemojo.com/title/tt2250912/?ref_=bo_cso_table_87" xlink:type="simple">Spider-Man: Homecoming</text:a></text:p>
          </table:table-cell>
          <table:table-cell office:value-type="string" calcext:value-type="string">
            <text:p>$880,978,185</text:p>
          </table:table-cell>
          <table:table-cell office:value-type="string" calcext:value-type="string">
            <text:p><text:a xlink:href="https://www.boxofficemojo.com/year/world/2017/?ref_=bo_cso_table_87" xlink:type="simple">2017</text:a>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www.boxofficemojo.com/title/tt2379713/?ref_=bo_cso_table_88" xlink:type="simple">Spectre</text:a></text:p>
          </table:table-cell>
          <table:table-cell office:value-type="string" calcext:value-type="string">
            <text:p>$880,707,597</text:p>
          </table:table-cell>
          <table:table-cell office:value-type="string" calcext:value-type="string">
            <text:p><text:a xlink:href="https://www.boxofficemojo.com/year/world/2015/?ref_=bo_cso_table_88" xlink:type="simple">2015</text:a>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www.boxofficemojo.com/title/tt1667889/?ref_=bo_cso_table_89" xlink:type="simple">Ice Age: Continental Drift</text:a></text:p>
          </table:table-cell>
          <table:table-cell office:value-type="string" calcext:value-type="string">
            <text:p>$877,244,782</text:p>
          </table:table-cell>
          <table:table-cell office:value-type="string" calcext:value-type="string">
            <text:p><text:a xlink:href="https://www.boxofficemojo.com/year/world/2012/?ref_=bo_cso_table_89" xlink:type="simple">2012</text:a>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www.boxofficemojo.com/title/tt2709768/?ref_=bo_cso_table_90" xlink:type="simple">The Secret Life of Pets</text:a></text:p>
          </table:table-cell>
          <table:table-cell office:value-type="string" calcext:value-type="string">
            <text:p>$875,698,161</text:p>
          </table:table-cell>
          <table:table-cell office:value-type="string" calcext:value-type="string">
            <text:p><text:a xlink:href="https://www.boxofficemojo.com/year/world/2016/?ref_=bo_cso_table_90" xlink:type="simple">2016</text:a>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www.boxofficemojo.com/title/tt2975590/?ref_=bo_cso_table_91" xlink:type="simple">Batman v Superman: Dawn of Justice</text:a></text:p>
          </table:table-cell>
          <table:table-cell office:value-type="string" calcext:value-type="string">
            <text:p>$874,362,803</text:p>
          </table:table-cell>
          <table:table-cell office:value-type="string" calcext:value-type="string">
            <text:p><text:a xlink:href="https://www.boxofficemojo.com/year/world/2016/?ref_=bo_cso_table_91" xlink:type="simple">2016</text:a>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www.boxofficemojo.com/title/tt7131870/?ref_=bo_cso_table_92" xlink:type="simple">Wolf Warrior 2</text:a></text:p>
          </table:table-cell>
          <table:table-cell office:value-type="string" calcext:value-type="string">
            <text:p>$870,325,439</text:p>
          </table:table-cell>
          <table:table-cell office:value-type="string" calcext:value-type="string">
            <text:p><text:a xlink:href="https://www.boxofficemojo.com/year/world/2017/?ref_=bo_cso_table_92" xlink:type="simple">2017</text:a>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www.boxofficemojo.com/title/tt31036941/?ref_=bo_cso_table_93" xlink:type="simple">Jurassic World: Rebirth</text:a></text:p>
          </table:table-cell>
          <table:table-cell office:value-type="string" calcext:value-type="string">
            <text:p>$869,146,189</text:p>
          </table:table-cell>
          <table:table-cell office:value-type="string" calcext:value-type="string">
            <text:p><text:a xlink:href="https://www.boxofficemojo.com/year/world/2025/?ref_=bo_cso_table_93" xlink:type="simple">2025</text:a>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www.boxofficemojo.com/title/tt1673434/?ref_=bo_cso_table_94" xlink:type="simple">The Twilight Saga: Breaking Dawn - Part 2</text:a></text:p>
          </table:table-cell>
          <table:table-cell office:value-type="string" calcext:value-type="string">
            <text:p>$868,590,075</text:p>
          </table:table-cell>
          <table:table-cell office:value-type="string" calcext:value-type="string">
            <text:p><text:a xlink:href="https://www.boxofficemojo.com/year/world/2012/?ref_=bo_cso_table_94" xlink:type="simple">2012</text:a>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www.boxofficemojo.com/title/tt1951264/?ref_=bo_cso_table_95" xlink:type="simple">The Hunger Games: Catching Fire</text:a></text:p>
          </table:table-cell>
          <table:table-cell office:value-type="string" calcext:value-type="string">
            <text:p>$865,011,746</text:p>
          </table:table-cell>
          <table:table-cell office:value-type="string" calcext:value-type="string">
            <text:p><text:a xlink:href="https://www.boxofficemojo.com/year/world/2013/?ref_=bo_cso_table_95" xlink:type="simple">2013</text:a>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www.boxofficemojo.com/title/tt3896198/?ref_=bo_cso_table_96" xlink:type="simple">Guardians of the Galaxy Vol. 2</text:a></text:p>
          </table:table-cell>
          <table:table-cell office:value-type="string" calcext:value-type="string">
            <text:p>$863,764,214</text:p>
          </table:table-cell>
          <table:table-cell office:value-type="string" calcext:value-type="string">
            <text:p><text:a xlink:href="https://www.boxofficemojo.com/year/world/2017/?ref_=bo_cso_table_96" xlink:type="simple">2017</text:a>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www.boxofficemojo.com/title/tt9114286/?ref_=bo_cso_table_97" xlink:type="simple">Black Panther: Wakanda Forever</text:a></text:p>
          </table:table-cell>
          <table:table-cell office:value-type="string" calcext:value-type="string">
            <text:p>$859,208,836</text:p>
          </table:table-cell>
          <table:table-cell office:value-type="string" calcext:value-type="string">
            <text:p><text:a xlink:href="https://www.boxofficemojo.com/year/world/2022/?ref_=bo_cso_table_97" xlink:type="simple">2022</text:a>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www.boxofficemojo.com/title/tt2096673/?ref_=bo_cso_table_98" xlink:type="simple">Inside Out</text:a></text:p>
          </table:table-cell>
          <table:table-cell office:value-type="string" calcext:value-type="string">
            <text:p>$859,076,254</text:p>
          </table:table-cell>
          <table:table-cell office:value-type="string" calcext:value-type="string">
            <text:p><text:a xlink:href="https://www.boxofficemojo.com/year/world/2015/?ref_=bo_cso_table_98" xlink:type="simple">2015</text:a>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www.boxofficemojo.com/title/tt1270797/?ref_=bo_cso_table_99" xlink:type="simple">Venom</text:a></text:p>
          </table:table-cell>
          <table:table-cell office:value-type="string" calcext:value-type="string">
            <text:p>$856,085,161</text:p>
          </table:table-cell>
          <table:table-cell office:value-type="string" calcext:value-type="string">
            <text:p><text:a xlink:href="https://www.boxofficemojo.com/year/world/2018/?ref_=bo_cso_table_99" xlink:type="simple">2018</text:a>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ww.boxofficemojo.com/title/tt3501632/?ref_=bo_cso_table_100" xlink:type="simple">Thor: Ragnarok</text:a></text:p>
          </table:table-cell>
          <table:table-cell office:value-type="string" calcext:value-type="string">
            <text:p>$855,301,806</text:p>
          </table:table-cell>
          <table:table-cell office:value-type="string" calcext:value-type="string">
            <text:p><text:a xlink:href="https://www.boxofficemojo.com/year/world/2017/?ref_=bo_cso_table_100" xlink:type="simple">2017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4:49:08.474947457</meta:creation-date>
    <dc:date>2026-02-19T14:50:13.502901958</dc:date>
    <meta:editing-duration>PT1M5S</meta:editing-duration>
    <meta:editing-cycles>1</meta:editing-cycles>
    <meta:generator>LibreOffice/24.2.7.2$Linux_X86_64 LibreOffice_project/420$Build-2</meta:generator>
    <meta:document-statistic meta:table-count="1" meta:cell-count="404" meta:object-count="0"/>
  </office:meta>
</office:document-meta>
</file>